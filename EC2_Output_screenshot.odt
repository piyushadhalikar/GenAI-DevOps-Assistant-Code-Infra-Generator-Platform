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4000002A8E10890B920D97296.png" manifest:media-type="image/png"/>
  <manifest:file-entry manifest:full-path="Pictures/10000001000004DE000002B38F47A1E1C518C6E8.png" manifest:media-type="image/png"/>
  <manifest:file-entry manifest:full-path="Pictures/10000001000004DE000002B3A9C3D3211E7CE5DA.png" manifest:media-type="image/png"/>
  <manifest:file-entry manifest:full-path="Pictures/10000001000004E4000002A8E9E9098ABE72F607.png" manifest:media-type="image/png"/>
  <manifest:file-entry manifest:full-path="Pictures/10000001000004E4000002A856EA98EAFA6114E4.png" manifest:media-type="image/png"/>
  <manifest:file-entry manifest:full-path="Pictures/10000001000004E4000002A8C8006126ABA2B4A6.png" manifest:media-type="image/png"/>
  <manifest:file-entry manifest:full-path="Pictures/10000001000004E4000002A893FA0611901C98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0559f" officeooo:paragraph-rsid="0010559f" style:font-size-asian="22.75pt" style:font-size-complex="26pt"/>
    </style:style>
    <style:style style:name="P2" style:family="paragraph" style:parent-style-name="Standard">
      <style:text-properties fo:font-size="18pt" officeooo:rsid="0010559f" officeooo:paragraph-rsid="0010559f" style:font-size-asian="15.75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 on ec2 based on user input:</text:p>
      <text:p text:style-name="P1"/>
      <text:p text:style-name="P1">1. generate a dockerfile for python flask app on port 8000</text:p>
      <text:p text:style-name="P1"><draw:frame draw:style-name="fr2" draw:name="Image1" text:anchor-type="char" svg:x="-0.0626in" svg:y="0.1339in" svg:width="6.9252in" svg:height="3.761in" draw:z-index="0"><draw:image xlink:href="Pictures/10000001000004E4000002A893FA0611901C9813.png" xlink:type="simple" xlink:show="embed" xlink:actuate="onLoad" draw:mime-type="image/png"/></draw:frame></text:p>
      <text:p text:style-name="P2"><draw:frame draw:style-name="fr2" draw:name="Image2" text:anchor-type="char" svg:x="-0.0102in" svg:y="0.0591in" svg:width="6.9252in" svg:height="3.761in" draw:z-index="1"><draw:image xlink:href="Pictures/10000001000004E4000002A856EA98EAFA6114E4.png" xlink:type="simple" xlink:show="embed" xlink:actuate="onLoad" draw:mime-type="image/png"/></draw:frame><text:soft-page-break/></text:p>
      <text:p text:style-name="P2">2 Generate basic Jenkins pipeline for Node.js project where we pull from github, build image and push to dockerhub with withcredentialsId function and then deploy.</text:p>
      <text:p text:style-name="P1"><draw:frame draw:style-name="fr1" draw:name="Image3" text:anchor-type="char" svg:width="6.9252in" svg:height="3.761in" draw:z-index="2"><draw:image xlink:href="Pictures/10000001000004E4000002A8E9E9098ABE72F607.png" xlink:type="simple" xlink:show="embed" xlink:actuate="onLoad" draw:mime-type="image/png"/></draw:frame></text:p>
      <text:p text:style-name="P1"><draw:frame draw:style-name="fr1" draw:name="Image4" text:anchor-type="char" svg:width="6.9252in" svg:height="3.761in" draw:z-index="3"><draw:image xlink:href="Pictures/10000001000004E4000002A8C8006126ABA2B4A6.png" xlink:type="simple" xlink:show="embed" xlink:actuate="onLoad" draw:mime-type="image/png"/></draw:frame><text:soft-page-break/></text:p>
      <text:p text:style-name="P1"><draw:frame draw:style-name="fr1" draw:name="Image5" text:anchor-type="char" svg:width="6.9252in" svg:height="3.761in" draw:z-index="4"><draw:image xlink:href="Pictures/10000001000004E4000002A8E10890B920D97296.png" xlink:type="simple" xlink:show="embed" xlink:actuate="onLoad" draw:mime-type="image/png"/></draw:frame></text:p>
      <text:p text:style-name="P1"/>
      <text:p text:style-name="P1"/>
      <text:p text:style-name="P1"><text:soft-page-break/>3 Generate Terraform for AWS EC2 Ubuntu instance</text:p>
      <text:p text:style-name="P1"><draw:frame draw:style-name="fr1" draw:name="Image6" text:anchor-type="char" svg:width="6.9252in" svg:height="3.8402in" draw:z-index="5"><draw:image xlink:href="Pictures/10000001000004DE000002B3A9C3D3211E7CE5DA.png" xlink:type="simple" xlink:show="embed" xlink:actuate="onLoad" draw:mime-type="image/png"/></draw:frame></text:p>
      <text:p text:style-name="P1"><draw:frame draw:style-name="fr1" draw:name="Image7" text:anchor-type="char" svg:width="6.9252in" svg:height="3.8402in" draw:z-index="6"><draw:image xlink:href="Pictures/10000001000004DE000002B38F47A1E1C518C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3T06:22:39.062135503</meta:creation-date>
    <dc:date>2026-05-03T06:38:22.110170375</dc:date>
    <meta:editing-duration>PT52S</meta:editing-duration>
    <meta:editing-cycles>1</meta:editing-cycles>
    <meta:document-statistic meta:table-count="0" meta:image-count="7" meta:object-count="0" meta:page-count="4" meta:paragraph-count="4" meta:word-count="51" meta:character-count="303" meta:non-whitespace-character-count="256"/>
    <meta:generator>LibreOffice/7.3.7.2$Linux_X86_64 LibreOffice_project/30$Build-2</meta:generator>
  </office:meta>
</office:document-meta>
</file>