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2B988004881603E09E3.png" manifest:media-type="image/png"/>
  <manifest:file-entry manifest:full-path="Pictures/10000001000004DF000002B9DF9202760929A301.png" manifest:media-type="image/png"/>
  <manifest:file-entry manifest:full-path="Pictures/10000001000004DF000002B9256565E9DFCAF9BD.png" manifest:media-type="image/png"/>
  <manifest:file-entry manifest:full-path="Pictures/10000001000004DF000002B9A52F0A1A8A50A844.png" manifest:media-type="image/png"/>
  <manifest:file-entry manifest:full-path="Pictures/10000001000004DF000002B965DF64E6B9ECD388.png" manifest:media-type="image/png"/>
  <manifest:file-entry manifest:full-path="Pictures/10000001000004DF000002B988DEB1826CDE4794.png" manifest:media-type="image/png"/>
  <manifest:file-entry manifest:full-path="Pictures/10000001000004DF000002B9E8E1CAA2A1D42F51.png" manifest:media-type="image/png"/>
  <manifest:file-entry manifest:full-path="Pictures/10000001000004DF000002B93D89D027A35B47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bb8" officeooo:paragraph-rsid="000b1bb8"/>
    </style:style>
    <style:style style:name="P2" style:family="paragraph" style:parent-style-name="Standard">
      <style:text-properties officeooo:rsid="000dfb89" officeooo:paragraph-rsid="000dfb89"/>
    </style:style>
    <style:style style:name="P3" style:family="paragraph" style:parent-style-name="Standard">
      <style:text-properties officeooo:rsid="000ff7dd" officeooo:paragraph-rsid="000ff7dd"/>
    </style:style>
    <style:style style:name="P4" style:family="paragraph" style:parent-style-name="Standard">
      <style:text-properties officeooo:rsid="0011743d" officeooo:paragraph-rsid="0011743d"/>
    </style:style>
    <style:style style:name="P5" style:family="paragraph" style:parent-style-name="Standard">
      <style:text-properties officeooo:rsid="000dfb89" officeooo:paragraph-rsid="000dfb89"/>
    </style:style>
    <style:style style:name="T1" style:family="text">
      <style:text-properties officeooo:rsid="0013487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9252in" svg:height="3.8701in" draw:z-index="0"><draw:image xlink:href="Pictures/10000001000004DF000002B93D89D027A35B4720.png" xlink:type="simple" xlink:show="embed" xlink:actuate="onLoad" draw:mime-type="image/png"/></draw:frame>Before <text:span text:style-name="T1">user_</text:span>input </text:p>
      <text:p text:style-name="P1"/>
      <text:p text:style-name="P1"/>
      <text:p text:style-name="P1"/>
      <text:p text:style-name="P2">After generating output depending on user input</text:p>
      <text:p text:style-name="P2"/>
      <text:p text:style-name="P2">1. create a Dockerfile for python flask app.</text:p>
      <text:p text:style-name="P2"><draw:frame draw:style-name="fr2" draw:name="Image2" text:anchor-type="char" svg:width="6.9252in" svg:height="3.8701in" draw:z-index="7"><draw:image xlink:href="Pictures/10000001000004DF000002B9E8E1CAA2A1D42F51.png" xlink:type="simple" xlink:show="embed" xlink:actuate="onLoad" draw:mime-type="image/png"/></draw:frame></text:p>
      <text:p text:style-name="P2"><text:soft-page-break/>2. create a Dockerfile for node.js app running on port 8000</text:p>
      <text:p text:style-name="P3"><draw:frame draw:style-name="fr1" draw:name="Image3" text:anchor-type="char" svg:width="6.9252in" svg:height="3.8701in" draw:z-index="1"><draw:image xlink:href="Pictures/10000001000004DF000002B988DEB1826CDE4794.png" xlink:type="simple" xlink:show="embed" xlink:actuate="onLoad" draw:mime-type="image/png"/></draw:frame></text:p>
      <text:p text:style-name="P3">3. Generate Jenkins pipeline for Node.js project where we pull from github, build image and push to dockerhub with withcredentialsId function and then deploy.</text:p>
      <text:p text:style-name="P4"><draw:frame draw:style-name="fr1" draw:name="Image4" text:anchor-type="char" svg:width="6.9252in" svg:height="3.8701in" draw:z-index="2"><draw:image xlink:href="Pictures/10000001000004DF000002B965DF64E6B9ECD388.png" xlink:type="simple" xlink:show="embed" xlink:actuate="onLoad" draw:mime-type="image/png"/></draw:frame></text:p>
      <text:p text:style-name="P4"><draw:frame draw:style-name="fr1" draw:name="Image5" text:anchor-type="char" svg:width="6.9252in" svg:height="3.8701in" draw:z-index="3"><draw:image xlink:href="Pictures/10000001000004DF000002B9A52F0A1A8A50A84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4. Generate Terraform for AWS EC2 Ubuntu instance</text:p>
      <text:p text:style-name="P4"><draw:frame draw:style-name="fr1" draw:name="Image6" text:anchor-type="char" svg:width="6.9252in" svg:height="3.8701in" draw:z-index="4"><draw:image xlink:href="Pictures/10000001000004DF000002B9DF9202760929A301.png" xlink:type="simple" xlink:show="embed" xlink:actuate="onLoad" draw:mime-type="image/png"/></draw:frame></text:p>
      <text:p text:style-name="P4"><draw:frame draw:style-name="fr1" draw:name="Image7" text:anchor-type="char" svg:width="6.9252in" svg:height="3.8701in" draw:z-index="5"><draw:image xlink:href="Pictures/10000001000004DF000002B9256565E9DFCAF9BD.png" xlink:type="simple" xlink:show="embed" xlink:actuate="onLoad" draw:mime-type="image/png"/></draw:frame><text:soft-page-break/></text:p>
      <text:p text:style-name="P4"><draw:frame draw:style-name="fr1" draw:name="Image8" text:anchor-type="char" svg:width="6.9252in" svg:height="3.8701in" draw:z-index="6"><draw:image xlink:href="Pictures/10000001000004DF000002B988004881603E09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7:17:27.352723133</meta:creation-date>
    <dc:date>2026-05-03T06:59:18.320864541</dc:date>
    <meta:editing-duration>PT4M19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6" meta:word-count="60" meta:character-count="375" meta:non-whitespace-character-count="320"/>
  </office:meta>
</office:document-meta>
</file>